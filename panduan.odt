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paragraph-properties fo:margin-top="0in" fo:margin-bottom="0.1965in" style:contextual-spacing="false"/>
    </style:style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fo:margin-top="0in" fo:margin-bottom="0.1965in" style:contextual-spacing="false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left="0in" fo:margin-right="0in" fo:text-indent="0in" style:auto-text-indent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left="0in" fo:margin-right="0in" fo:text-indent="0in" style:auto-text-indent="false"/>
    </style:style>
    <style:style style:name="P11" style:family="paragraph" style:parent-style-name="Text_20_body" style:list-style-name="L2">
      <style:text-properties fo:font-weight="bold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 text:start-value="3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HAP 1: SETUP &amp; DOCKERIZATION</text:h>
      <text:h text:style-name="Heading_20_3" text:outline-level="3">Langkah 1: Membersihkan Package Docker Lama</text:h>
      <text:p text:style-name="Text_20_body">Kita bersihkan sistem Ubuntu dari Docker versi bawaan agar tidak terjadi konflik nantinya.</text:p>
      <text:p text:style-name="P6">Bash</text:p>
      <text:p text:style-name="P1"><text:span text:style-name="Source_20_Text">sudo apt-get remove docker docker-engine docker.io containerd runc -y</text:span></text:p>
      <text:h text:style-name="Heading_20_3" text:outline-level="3">Langkah 2: Menyiapkan Alat Pendukung &amp; Repository Docker</text:h>
      <text:p text:style-name="Text_20_body">Kita mengunduh sertifikat keamanan dan mendaftarkan sumber server resmi Docker ke sistem Ubuntu lo.</text:p>
      <text:p text:style-name="P6">Bash</text:p>
      <text:p text:style-name="Preformatted_20_Text"><text:span text:style-name="Source_20_Text">sudo apt-get update</text:span></text:p>
      <text:p text:style-name="Preformatted_20_Text"><text:span text:style-name="Source_20_Text">sudo apt-get install ca-certificates curl gnupg lsb-release -y</text:span></text:p>
      <text:p text:style-name="Preformatted_20_Text"><text:span text:style-name="Source_20_Text">sudo mkdir -p /etc/apt/keyrings</text:span></text:p>
      <text:p text:style-name="Preformatted_20_Text"><text:span text:style-name="Source_20_Text">curl -fsSL https://download.download.com/linux/ubuntu/gpg | sudo gpg --dearmor -o /etc/apt/keyrings/docker.gpg</text:span></text:p>
      <text:p text:style-name="P1"><text:span text:style-name="Source_20_Text">echo "deb [arch=$(dpkg --print-architecture) signed-by=/etc/apt/keyrings/docker.gpg] https://download.docker.com/linux/ubuntu $(lsb_release -cs) stable" | sudo tee /etc/apt/sources.list.d/docker.list &gt; /dev/null</text:span></text:p>
      <text:h text:style-name="Heading_20_3" text:outline-level="3">Langkah 3: Mengunduh &amp; Menginstall Docker Utama</text:h>
      <text:p text:style-name="Text_20_body">Kita melakukan update index lalu menginstall mesin utama Docker beserta plugin Docker Compose ke Ubuntu lo.</text:p>
      <text:p text:style-name="P6">Bash</text:p>
      <text:p text:style-name="Preformatted_20_Text"><text:span text:style-name="Source_20_Text">sudo apt-get update</text:span></text:p>
      <text:p text:style-name="P1"><text:span text:style-name="Source_20_Text">sudo apt-get install docker-ce docker-ce-cli containerd.io docker-buildx-plugin docker-compose-plugin -y</text:span></text:p>
      <text:h text:style-name="Heading_20_3" text:outline-level="3">Langkah 4: Mendaftarkan User ke Group Docker (Post-Install)</text:h>
      <text:p text:style-name="Text_20_body">Supaya user Ubuntu lo bisa mengontrol Docker tanpa perlu mengetik kata <text:span text:style-name="Source_20_Text">sudo</text:span> terus-menerus.</text:p>
      <text:p text:style-name="P6">Bash</text:p>
      <text:p text:style-name="P1"><text:span text:style-name="Source_20_Text">sudo usermod -aG docker $USER</text:span></text:p>
      <text:h text:style-name="Heading_20_3" text:outline-level="3">Langkah 5: Masuk ke Folder Project &amp; Menyiapkan File</text:h>
      <text:p text:style-name="Text_20_body">Lo berpindah ke folder project UAS lo yang berada di folder Documents.</text:p>
      <text:p text:style-name="P6">Bash</text:p>
      <text:p text:style-name="P1"><text:span text:style-name="Source_20_Text">cd ~/Documents/Praktikum-devops-tazkia</text:span></text:p>
      <text:p text:style-name="Text_20_body"><text:span text:style-name="T1">Di dalam folder ini, kita menyiapkan file </text:span><text:span text:style-name="Source_20_Text"><text:span text:style-name="T1">Dockerfile</text:span></text:span><text:span text:style-name="T1">, </text:span><text:span text:style-name="Source_20_Text"><text:span text:style-name="T1">docker-compose.yml</text:span></text:span><text:span text:style-name="T1">, serta folder </text:span><text:span text:style-name="Source_20_Text"><text:span text:style-name="T1">html</text:span></text:span><text:span text:style-name="T1"> yang berisi </text:span><text:span text:style-name="Source_20_Text"><text:span text:style-name="T1">index.html</text:span></text:span><text:span text:style-name="T1"> dan </text:span><text:span text:style-name="Source_20_Text"><text:span text:style-name="T1">logo.png</text:span></text:span><text:span text:style-name="T1">.</text:span></text:p>
      <text:h text:style-name="Heading_20_3" text:outline-level="3"><text:soft-page-break/>Langkah 6: Eksekusi Menyalakan Docker Compose (Percobaan Pertama)</text:h>
      <text:p text:style-name="Text_20_body">Setelah semua file siap, kita jalankan perintah andalan untuk membangun dan menyalakan kontainer di latar belakang.</text:p>
      <text:p text:style-name="P6">Bash</text:p>
      <text:p text:style-name="P1"><text:span text:style-name="Source_20_Text">docker compose up --build -d</text:span></text:p>
      <text:h text:style-name="Heading_20_4" text:outline-level="4">❌ KENDALA YANG MUNCUL PADA LANGKAH INI:</text:h>
      <text:list text:style-name="L1">
        <text:list-item>
          <text:p text:style-name="P7"><text:span text:style-name="T2">Error: </text:span><text:span text:style-name="Source_20_Text"><text:span text:style-name="T2">no configuration file provided: not found</text:span></text:span></text:p>
          <text:list>
            <text:list-item>
              <text:p text:style-name="P7"><text:span text:style-name="T1">Penyebab:</text:span> Docker tidak bisa menemukan file <text:span text:style-name="Source_20_Text">docker-compose.yml</text:span> karena ada typo nama file menjadi <text:span text:style-name="Source_20_Text">decker-compose.yml</text:span> (pakai huruf 'e').</text:p>
            </text:list-item>
            <text:list-item>
              <text:p text:style-name="P7">🛠️ <text:span text:style-name="T1">Perintah Backup/Solusi:</text:span> Ubah nama file ke yang benar pakai perintah:</text:p>
              <text:p text:style-name="P8">Bash</text:p>
              <text:p text:style-name="P3"><text:span text:style-name="Source_20_Text">mv decker-compose.yml docker-compose.yml</text:span></text:p>
            </text:list-item>
          </text:list>
        </text:list-item>
        <text:list-item>
          <text:p text:style-name="P7"><text:span text:style-name="T2">Error: </text:span><text:span text:style-name="Source_20_Text"><text:span text:style-name="T2">permission denied while trying to connect to the docker API</text:span></text:span></text:p>
          <text:list>
            <text:list-item>
              <text:p text:style-name="P7"><text:span text:style-name="T1">Penyebab:</text:span> Hak akses group docker yang kita daftarkan di <text:span text:style-name="T1">Langkah 4</text:span> belum segar/aktif di sesi terminal saat ini.</text:p>
            </text:list-item>
            <text:list-item>
              <text:p text:style-name="P7">🛠️ <text:span text:style-name="T1">Perintah Backup/Solusi:</text:span> Paksa refresh hak akses terminal dengan perintah:</text:p>
              <text:p text:style-name="P8">Bash</text:p>
              <text:p text:style-name="P3"><text:span text:style-name="Source_20_Text">newgrp docker</text:span></text:p>
            </text:list-item>
          </text:list>
        </text:list-item>
        <text:list-item>
          <text:p text:style-name="P7"><text:span text:style-name="T2">Error: </text:span><text:span text:style-name="Source_20_Text"><text:span text:style-name="T2">failed to solve: no build stage in current context</text:span></text:span></text:p>
          <text:list>
            <text:list-item>
              <text:p text:style-name="P7"><text:span text:style-name="T1">Penyebab:</text:span> Docker gagal memproses <text:span text:style-name="Source_20_Text">Dockerfile</text:span> karena baris paling pertama (<text:span text:style-name="Source_20_Text">FROM nginx:alpine</text:span>) tidak sengaja terhapus, sehingga Docker kehilangan pondasi OS-nya.</text:p>
            </text:list-item>
            <text:list-item>
              <text:p text:style-name="P7">🛠️ <text:span text:style-name="T1">Perintah Backup/Solusi:</text:span> Buka file pakai <text:span text:style-name="Source_20_Text">nano Dockerfile</text:span>, lalu tulis ulang struktur wajibnya:</text:p>
              <text:p text:style-name="P8">Dockerfile</text:p>
              <text:p text:style-name="P2"><text:span text:style-name="Source_20_Text">FROM nginx:alpine</text:span></text:p>
              <text:p text:style-name="P2"><text:span text:style-name="Source_20_Text">COPY html/ /usr/share/nginx/html/</text:span></text:p>
              <text:p text:style-name="P3"><text:span text:style-name="Source_20_Text">EXPOSE 80</text:span></text:p>
            </text:list-item>
          </text:list>
        </text:list-item>
      </text:list>
      <text:h text:style-name="Heading_20_3" text:outline-level="3">Langkah 7: Eksekusi Ulang Setelah Perbaikan File &amp; Sistem</text:h>
      <text:p text:style-name="Text_20_body">Setelah semua kendala di Langkah 6 diatasi dengan perintah backup, kita eksekusi ulang perintah utama:</text:p>
      <text:p text:style-name="P6">Bash</text:p>
      <text:p text:style-name="P1"><text:span text:style-name="Source_20_Text">docker compose up --build -d</text:span></text:p>
      <text:p text:style-name="Text_20_body"><text:soft-page-break/><text:span text:style-name="T1">Hasil di terminal:</text:span> Sukses memproses build dan memunculkan status <text:span text:style-name="Source_20_Text">Started</text:span>.</text:p>
      <text:h text:style-name="Heading_20_3" text:outline-level="3">Langkah 8: Pengujian di Browser &amp; Pembersihan Cache Kontainer</text:h>
      <text:p text:style-name="Text_20_body">Lo membuka browser Ubuntu dan mengakses alamat <text:span text:style-name="Source_20_Text">http://localhost:3000</text:span>.</text:p>
      <text:h text:style-name="Heading_20_4" text:outline-level="4">❌ KENDALA YANG MUNCUL PADA LANGKAH INI:</text:h>
      <text:list text:style-name="L2">
        <text:list-item>
          <text:p text:style-name="P11">Halaman web muncul, tapi LOGO FAJRUSSALAM HILANG (Broken Image).</text:p>
          <text:list>
            <text:list-item>
              <text:p text:style-name="P9"><text:span text:style-name="T1">Penyebab:</text:span> Di <text:span text:style-name="Source_20_Text">Dockerfile</text:span> awal, perintahnya cuma menyalin satu file <text:span text:style-name="Source_20_Text">COPY html/index.html ...</text:span>, sehingga file <text:span text:style-name="Source_20_Text">logo.png</text:span> tertinggal di laptop dan tidak ikut dibungkus ke dalam kontainer. Selain itu, browser lo menyimpan memori halaman lama yang tanpa gambar (cache).</text:p>
            </text:list-item>
            <text:list-item>
              <text:p text:style-name="P9">🛠️ <text:span text:style-name="T1">Perintah Backup/Solusi:</text:span> 1. Pastikan <text:span text:style-name="Source_20_Text">Dockerfile</text:span> sudah diubah perintahnya menjadi <text:span text:style-name="Source_20_Text">COPY html/ /usr/share/nginx/html/</text:span> (untuk menyalin satu folder penuh sekaligus). 2. Jalankan rangkaian perintah pembersihan total dan build ulang dari nol tanpa cache ini:</text:p>
              <text:p text:style-name="P10">Bash</text:p>
              <text:p text:style-name="P4"><text:span text:style-name="Source_20_Text">docker compose down</text:span></text:p>
              <text:p text:style-name="P4"><text:span text:style-name="Source_20_Text">docker compose build --no-cache</text:span></text:p>
              <text:p text:style-name="P5"><text:span text:style-name="Source_20_Text">docker compose up -d</text:span></text:p>
              <text:list>
                <text:list-item>
                  <text:p text:style-name="P9">Buka browser di <text:span text:style-name="Source_20_Text">http://localhost:3000</text:span> lalu tekan <text:span text:style-name="Source_20_Text"><text:span text:style-name="T2">CTRL + F5</text:span></text:span> (Hard Refresh) untuk membuang cache browser lama.</text:p>
                </text:list-item>
              </text:list>
            </text:list-item>
          </text:list>
        </text:list-item>
      </text:list>
      <text:h text:style-name="Heading_20_3" text:outline-level="3">🏁 HASIL AKHIR TAHAP 1 (SUKSES TOTAL)</text:h>
      <text:p text:style-name="Text_20_body">Aplikasi portal pendaftaran santri PP Fajrussalam beserta aset logonya sudah tampil dengan mulus dan sempurna di alamat <text:span text:style-name="Source_20_Text"><text:span text:style-name="T2">http://localhost:3000</text:span></text:span>. Selesai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9T22:37:17.424526918</meta:creation-date>
    <dc:date>2026-06-09T22:38:00.924150202</dc:date>
    <meta:editing-duration>PT45S</meta:editing-duration>
    <meta:editing-cycles>1</meta:editing-cycles>
    <meta:document-statistic meta:table-count="0" meta:image-count="0" meta:object-count="0" meta:page-count="3" meta:paragraph-count="67" meta:word-count="595" meta:character-count="4182" meta:non-whitespace-character-count="3684"/>
    <meta:generator>LibreOffice/24.2.7.2$Linux_X86_64 LibreOffice_project/420$Build-2</meta:generator>
  </office:meta>
</office:document-meta>
</file>